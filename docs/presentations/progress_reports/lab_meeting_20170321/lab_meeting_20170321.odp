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4000003464D6DBC03CEB568D3.png" manifest:media-type="image/png"/>
  <manifest:file-entry manifest:full-path="Pictures/100000000000049F0000035B26989BF9B3E0AC66.png" manifest:media-type="image/png"/>
  <manifest:file-entry manifest:full-path="Pictures/100000000000052B000002899771B70C0B6A6FFF.png" manifest:media-type="image/png"/>
  <manifest:file-entry manifest:full-path="Pictures/10000201000010C8000008BC1C163A2E6066231B.png" manifest:media-type="image/png"/>
  <manifest:file-entry manifest:full-path="Pictures/10000000000005680000035A7B6AE1A3191CBC81.png" manifest:media-type="image/png"/>
  <manifest:file-entry manifest:full-path="Pictures/10000201000002BC000001C9E85D0DA1045DFBB2.png" manifest:media-type="image/png"/>
  <manifest:file-entry manifest:full-path="Pictures/1000000000000384000002580F28B15812F5CC04.jpg" manifest:media-type="image/jpeg"/>
  <manifest:file-entry manifest:full-path="Pictures/1000000000000774000002057479399ABA6F8164.png" manifest:media-type="image/png"/>
  <manifest:file-entry manifest:full-path="Pictures/10000000000003840000026948336709C4B94492.jpg" manifest:media-type="image/jpeg"/>
  <manifest:file-entry manifest:full-path="Pictures/100000000000027900000315D17E9489F663176F.png" manifest:media-type="image/png"/>
  <manifest:file-entry manifest:full-path="Pictures/10000000000002B00000032786F74B349667105F.png" manifest:media-type="image/png"/>
  <manifest:file-entry manifest:full-path="Pictures/100002010000094D000004EAABD4D9DCBA5AA082.png" manifest:media-type="image/png"/>
  <manifest:file-entry manifest:full-path="Pictures/10000000000002340000037331FA28137ABFD073.png" manifest:media-type="image/png"/>
  <manifest:file-entry manifest:full-path="Pictures/100000000000027900000315861D95161323E1BF.png" manifest:media-type="image/png"/>
  <manifest:file-entry manifest:full-path="Pictures/100000000000024500000349FE83931D40640E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5cm, 0cm, 1.073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10.02cm, 0.99cm, -0.5cm)" draw:image-opacity="100%" style:mirror="none"/>
    </style:style>
    <style:style style:name="gr7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52cm" fo:min-width="1.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473cm" fo:min-width="1.542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51cm, 0cm)" draw:image-opacity="100%" style:mirror="none"/>
    </style:style>
    <style:style style:name="gr12" style:family="graphic" style:parent-style-name="standard">
      <style:graphic-properties draw:stroke="solid" draw:stroke-dash="Fine_20_Dashed" svg:stroke-color="#ff0000" draw:fill-color="#ff0000" draw:textarea-horizontal-align="justify" draw:textarea-vertical-align="middle" draw:auto-grow-height="false" fo:min-height="0.026cm" fo:min-width="0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1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6cm, 0cm, 0.183cm, 9.747cm)" draw:image-opacity="100%" style:mirror="none"/>
    </style:style>
    <style:style style:name="gr16" style:family="graphic" style:parent-style-name="standard">
      <style:graphic-properties draw:stroke="none" draw:fill="none" fo:min-height="0.78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7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45cm, 0.285cm, 0cm)" draw:image-opacity="100%" style:mirror="none"/>
    </style:style>
    <style:style style:name="gr19" style:family="graphic" style:parent-style-name="standard">
      <style:graphic-properties draw:stroke="none" draw:fill="none" fo:min-height="0.846cm"/>
    </style:style>
    <style:style style:name="gr20" style:family="graphic" style:parent-style-name="standard">
      <style:graphic-properties draw:fill-color="#00ffff" draw:opacity="24%" draw:textarea-horizontal-align="justify" draw:textarea-vertical-align="middle" draw:auto-grow-height="false" fo:min-height="0.347cm" fo:min-width="0.3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41cm"/>
    </style:style>
    <style:style style:name="gr22" style:family="graphic" style:parent-style-name="standard">
      <style:graphic-properties draw:stroke="none" draw:fill-color="#ff9900" draw:textarea-vertical-align="middle" draw:auto-grow-height="false" fo:min-height="0.08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3cm"/>
    </style:style>
    <style:style style:name="gr24" style:family="graphic" style:parent-style-name="standard">
      <style:graphic-properties draw:fill-color="#00ffff" draw:opacity="24%" draw:textarea-horizontal-align="justify" draw:textarea-vertical-align="middle" draw:auto-grow-height="false" fo:min-height="0.21cm" fo:min-width="1.396cm"/>
    </style:style>
    <style:style style:name="gr25" style:family="graphic" style:parent-style-name="standard">
      <style:graphic-properties draw:fill-color="#00ffff" draw:opacity="24%" draw:textarea-horizontal-align="justify" draw:textarea-vertical-align="middle" draw:auto-grow-height="false" fo:min-height="1.481cm" fo:min-width="1.578cm"/>
    </style:style>
    <style:style style:name="gr26" style:family="graphic" style:parent-style-name="standard">
      <style:graphic-properties draw:fill-color="#00ffff" draw:opacity="24%" draw:textarea-horizontal-align="justify" draw:textarea-vertical-align="middle" draw:auto-grow-height="false" fo:min-height="0.236cm" fo:min-width="2.132cm"/>
    </style:style>
    <style:style style:name="gr27" style:family="graphic" style:parent-style-name="standard">
      <style:graphic-properties draw:fill-color="#00ffff" draw:opacity="24%" draw:textarea-horizontal-align="justify" draw:textarea-vertical-align="middle" draw:auto-grow-height="false" fo:min-height="0.712cm" fo:min-width="1.57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9.863cm"/>
    </style:style>
    <style:style style:name="pr4" style:family="presentation" style:parent-style-name="Default-outline1">
      <style:graphic-properties fo:min-height="5.58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6.7cm"/>
    </style:style>
    <style:style style:name="pr9" style:family="presentation" style:parent-style-name="Default-outline1">
      <style:graphic-properties fo:min-height="9.1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1.1cm"/>
    </style:style>
    <style:style style:name="P7" style:family="paragraph">
      <style:paragraph-properties fo:margin-top="0cm" fo:margin-bottom="1.1cm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1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top="0.4cm" fo:margin-bottom="0.9cm"/>
    </style:style>
    <style:style style:name="P14" style:family="paragraph">
      <style:paragraph-properties fo:margin-top="0.4cm" fo:margin-bottom="0.8cm"/>
    </style:style>
    <style:style style:name="P15" style:family="paragraph">
      <style:paragraph-properties fo:margin-top="0.4cm" fo:margin-bottom="0.908cm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top="0cm" fo:margin-bottom="1.2cm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loext:graphic-properties draw:fill-color="#00ffff" draw:opacity="24%"/>
      <style:paragraph-properties fo:text-align="center"/>
    </style:style>
    <style:style style:name="P23" style:family="paragraph">
      <loext:graphic-properties draw:fill-color="#ff9900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5cm" svg:height="2.453cm" svg:x="2cm" svg:y="2cm">
          <draw:text-box>
            <text:p text:style-name="P1"><text:span text:style-name="T1">Identification of the complementary sex determination (CSD</text:span><text:span text:style-name="T2">)</text:span><text:span text:style-name="T3"> </text:span><text:span text:style-name="T1">locus in</text:span><text:span text:style-name="T3"> Lysiphlebus fabarum</text:span></text:p>
          </draw:text-box>
        </draw:frame>
        <draw:frame draw:style-name="gr2" draw:text-style-name="P3" draw:layer="layout" svg:width="15.001cm" svg:height="10cm" svg:x="0.001cm" svg:y="11.008cm">
          <draw:image xlink:href="Pictures/1000000000000384000002580F28B15812F5CC04.jpg" xlink:type="simple" xlink:show="embed" xlink:actuate="onLoad">
            <text:p/>
          </draw:image>
        </draw:frame>
        <draw:frame draw:style-name="gr3" draw:text-style-name="P3" draw:layer="layout" svg:width="13.014cm" svg:height="10.006cm" svg:x="15cm" svg:y="11.011cm">
          <draw:image xlink:href="Pictures/10000000000003840000026948336709C4B94492.jpg" xlink:type="simple" xlink:show="embed" xlink:actuate="onLoad">
            <text:p/>
          </draw:image>
        </draw:frame>
        <draw:frame draw:style-name="gr4" draw:text-style-name="P4" draw:layer="layout" svg:width="19cm" svg:height="3.806cm" svg:x="0.5cm" svg:y="6.194cm">
          <draw:text-box>
            <text:p>Cyril Matthey-Doret</text:p>
            <text:p/>
            <text:p>Supervised by: Casper Van Der Kooi</text:p>
            <text:p/>
            <text:p>Directed by: Tanja Schwande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SD mechanism</text:p>
          </draw:text-box>
        </draw:frame>
        <draw:frame presentation:style-name="pr3" draw:layer="layout" svg:width="17.6cm" svg:height="9.863cm" svg:x="1.4cm" svg:y="9.214cm" presentation:class="outline" presentation:user-transformed="true">
          <draw:text-box>
            <text:list text:style-name="L2">
              <text:list-item>
                <text:p><text:span text:style-name="T4">Males are normally haploid: single copy</text:span></text:p>
              </text:list-item>
              <text:list-item>
                <text:p><text:span text:style-name="T4">Diploid individuals with homozygous CSD develop into males</text:span></text:p>
              </text:list-item>
              <text:list-item>
                <text:p><text:span text:style-name="T4">Can be single or multi-locus CSD</text:span></text:p>
              </text:list-item>
            </text:list>
          </draw:text-box>
        </draw:frame>
        <draw:frame draw:style-name="gr6" draw:text-style-name="P3" draw:layer="layout" svg:width="9.623cm" svg:height="10.801cm" svg:x="17.9cm" svg:y="8.199cm">
          <draw:image xlink:href="Pictures/10000201000002BC000001C9E85D0DA1045DFBB2.png" xlink:type="simple" xlink:show="embed" xlink:actuate="onLoad">
            <text:p/>
          </draw:image>
        </draw:frame>
        <draw:frame presentation:style-name="pr4" draw:layer="layout" svg:width="25.1cm" svg:height="5.586cm" svg:x="1.4cm" svg:y="5.914cm" presentation:class="outline" presentation:user-transformed="true">
          <draw:text-box>
            <text:list text:style-name="L2">
              <text:list-item>
                <text:p>2 different alleles required to trigger female developme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L.fabarum : </text:span>Introduction</text:p>
          </draw:text-box>
        </draw:frame>
        <draw:frame presentation:style-name="pr6" draw:text-style-name="P7" draw:layer="layout" svg:width="16cm" svg:height="12.18cm" svg:x="1.5cm" svg:y="4.914cm" presentation:class="outline" presentation:user-transformed="true">
          <draw:text-box>
            <text:list text:style-name="L2">
              <text:list-item>
                <text:p text:style-name="P6"><text:span text:style-name="T6">Sex and asex populations</text:span></text:p>
              </text:list-item>
              <text:list-item>
                <text:p text:style-name="P6"><text:span text:style-name="T6">Central fusion automixis: recombination</text:span></text:p>
              </text:list-item>
              <text:list-item>
                <text:p text:style-name="P6"><text:span text:style-name="T6">Thelytoky: recessively inherited from a single locus</text:span></text:p>
              </text:list-item>
              <text:list-item>
                <text:p text:style-name="P6"><text:span text:style-name="T7">Multi-locus or single-locus </text:span><text:span text:style-name="T8">csd ?</text:span></text:p>
              </text:list-item>
            </text:list>
          </draw:text-box>
        </draw:frame>
        <draw:frame draw:style-name="gr2" draw:text-style-name="P3" draw:layer="layout" svg:width="10.539cm" svg:height="16.5cm" svg:x="17.461cm" svg:y="4.5cm">
          <draw:image xlink:href="Pictures/10000000000002340000037331FA28137ABFD0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draw:style-name="gr2" draw:text-style-name="P3" draw:layer="layout" svg:width="11.5cm" svg:height="14.334cm" svg:x="15.2cm" svg:y="4.892cm">
          <draw:image xlink:href="Pictures/100000000000027900000315D17E9489F663176F.png" xlink:type="simple" xlink:show="embed" xlink:actuate="onLoad">
            <text:p/>
          </draw:image>
        </draw:frame>
        <draw:frame presentation:style-name="pr6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9">Thelytokous females</text:span></text:p>
              </text:list-item>
              <text:list-item>
                <text:p text:style-name="P9"><text:span text:style-name="T9">Stronlgy inbred</text:span></text:p>
                <text:list>
                  <text:list-item>
                    <text:p><text:span text:style-name="T9">High rate of diploid males production</text:span></text:p>
                  </text:list-item>
                  <text:list-item>
                    <text:p><text:span text:style-name="T9">Highly homozyg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1.5cm" svg:height="14.334cm" svg:x="15.2cm" svg:y="4.892cm">
          <draw:image xlink:href="Pictures/100000000000027900000315861D95161323E1BF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line draw:style-name="gr7" draw:text-style-name="P3" draw:layer="layout" svg:x1="23.737cm" svg:y1="7.059cm" svg:x2="20.792cm" svg:y2="7.043cm">
          <text:p/>
        </draw:line>
        <draw:frame draw:style-name="gr8" draw:text-style-name="P4" draw:layer="layout" svg:width="2cm" svg:height="2.384cm" svg:x="23.7cm" svg:y="6.6cm">
          <draw:text-box>
            <text:p>X 11</text:p>
          </draw:text-box>
        </draw:frame>
        <draw:custom-shape draw:style-name="gr9" draw:text-style-name="P3" draw:layer="layout" svg:width="1.68cm" svg:height="0.882cm" draw:transform="skewX (-0.0010471975511966) rotate (3.13600759998341) translate (25.43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827cm" svg:y1="14.943cm" svg:x2="14.409cm" svg:y2="14.943cm">
          <text:p/>
        </draw:line>
        <draw:frame draw:style-name="gr8" draw:text-style-name="P4" draw:layer="layout" svg:width="2.213cm" svg:height="2.384cm" svg:x="10.7cm" svg:y="14.422cm">
          <draw:text-box>
            <text:p>X 172</text:p>
          </draw:text-box>
        </draw:frame>
        <draw:custom-shape draw:style-name="gr10" draw:text-style-name="P3" draw:layer="layout" svg:width="2.122cm" svg:height="0.803cm" draw:transform="rotate (-3.14159265358979) translate (12.822cm 15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9">Total of 172 individuals</text:span></text:p>
              </text:list-item>
              <text:list-item>
                <text:p text:style-name="P9"><text:span text:style-name="T9">From 11 different thelytokous moth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presentation:style-name="pr6" draw:text-style-name="P11" draw:layer="layout" svg:width="13.1cm" svg:height="12.18cm" svg:x="1.4cm" svg:y="4.914cm" presentation:class="outline" presentation:user-transformed="true">
          <draw:text-box>
            <text:list text:style-name="L2">
              <text:list-item>
                <text:p>Different allelic combinations of CSD</text:p>
              </text:list-item>
              <text:list-item>
                <text:p>Haploid males: useless</text:p>
              </text:list-item>
            </text:list>
          </draw:text-box>
        </draw:frame>
        <draw:frame draw:style-name="gr2" draw:text-style-name="P3" draw:layer="layout" svg:width="13.007cm" svg:height="15.258cm" svg:x="14.4cm" svg:y="4.742cm">
          <draw:image xlink:href="Pictures/10000000000002B00000032786F74B34966710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6" draw:text-style-name="P12" draw:layer="layout" svg:width="25.199cm" svg:height="12.18cm" svg:x="1.4cm" svg:y="4.514cm" presentation:class="outline" presentation:user-transformed="true">
          <draw:text-box>
            <text:list text:style-name="L3">
              <text:list-item>
                <text:p><text:span text:style-name="T10">172 wasps RAD-seq'uenced</text:span></text:p>
              </text:list-item>
            </text:list>
            <text:list text:style-name="L4">
              <text:list-item>
                <text:p><text:span text:style-name="T10">Exclude haploid males: homozygosity levels</text:span></text:p>
              </text:list-item>
              <text:list-item>
                <text:p><text:span text:style-name="T10">Build catalogue of loci (reference genome available !)</text:span></text:p>
              </text:list-item>
              <text:list-item>
                <text:p><text:span text:style-name="T10">Identify candidate loci in each family using SNPs</text:span></text:p>
              </text:list-item>
              <text:list-item>
                <text:p><text:span text:style-name="T10">Filter common candidate across all families</text:span></text:p>
              </text:list-item>
            </text:list>
          </draw:text-box>
        </draw:frame>
        <draw:frame draw:style-name="gr2" draw:text-style-name="P3" draw:layer="layout" svg:width="27.999cm" svg:height="7.59cm" svg:x="0.001cm" svg:y="13.41cm">
          <draw:image xlink:href="Pictures/1000000000000774000002057479399ABA6F816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lternative approach (plan B)</text:p>
          </draw:text-box>
        </draw:frame>
        <draw:frame presentation:style-name="pr6" draw:layer="layout" svg:width="25.199cm" svg:height="12.18cm" svg:x="1.4cm" svg:y="5.614cm" presentation:class="outline" presentation:user-transformed="true">
          <draw:text-box>
            <text:list text:style-name="L2">
              <text:list-item>
                <text:p text:style-name="P13"><text:span text:style-name="T11">First approach could fail because:</text:span></text:p>
                <text:list>
                  <text:list-item>
                    <text:p text:style-name="P14"><text:span text:style-name="T9">not any loci close enough to CSD</text:span></text:p>
                  </text:list-item>
                  <text:list-item>
                    <text:p text:style-name="P14"><text:span text:style-name="T12">L.fabarum </text:span><text:span text:style-name="T9">may be </text:span><text:span text:style-name="T12">ml-</text:span><text:span text:style-name="T9">CSD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11">Use association between blocks of SNPs and diploid male phenotype instea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ternative approach (plan B)</text:p>
          </draw:text-box>
        </draw:frame>
        <draw:frame presentation:style-name="pr8" draw:text-style-name="P11" draw:layer="layout" svg:width="26.4cm" svg:height="16.7cm" svg:x="0.6cm" svg:y="6cm" presentation:class="outline" presentation:user-transformed="true">
          <draw:text-box>
            <text:p/>
          </draw:text-box>
        </draw:frame>
        <draw:frame presentation:style-name="pr8" draw:text-style-name="P11" draw:layer="layout" svg:width="26.4cm" svg:height="16.7cm" svg:x="0.6cm" svg:y="6cm" presentation:class="outline" presentation:user-transformed="true">
          <draw:text-box>
            <text:list text:style-name="L2">
              <text:list-item>
                <text:p><text:span text:style-name="T13">Classify SNPs in each individual as in approach 1</text:span></text:p>
              </text:list-item>
              <text:list-item>
                <text:p><text:span text:style-name="T13">Identify regions frequently associated with diploid male phenotype</text:span></text:p>
              </text:list-item>
            </text:list>
          </draw:text-box>
        </draw:frame>
        <draw:frame draw:style-name="gr11" draw:text-style-name="P3" draw:layer="layout" svg:width="21.3cm" svg:height="6.999cm" svg:x="2.7cm" svg:y="8.5cm">
          <draw:image xlink:href="Pictures/100002010000094D000004EAABD4D9DCBA5AA082.png" xlink:type="simple" xlink:show="embed" xlink:actuate="onLoad">
            <text:p/>
          </draw:image>
        </draw:frame>
        <draw:custom-shape draw:style-name="gr12" draw:text-style-name="P16" draw:layer="layout" svg:width="0.282cm" svg:height="0.276cm" svg:x="22.045cm" svg:y="11.0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282cm" svg:height="0.276cm" svg:x="20.589cm" svg:y="13.3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282cm" svg:height="0.276cm" svg:x="23.497cm" svg:y="13.3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cm" svg:height="2cm" svg:x="6.5cm" svg:y="14.56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5.5cm" svg:height="0.962cm" svg:x="10.2cm" svg:y="14.6cm">
          <draw:text-box>
            <text:p>genome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ternative approach (plan B)</text:p>
          </draw:text-box>
        </draw:frame>
        <draw:frame presentation:style-name="pr8" draw:text-style-name="P11" draw:layer="layout" svg:width="26.4cm" svg:height="16.7cm" svg:x="0.6cm" svg:y="6cm" presentation:class="outline" presentation:user-transformed="true">
          <draw:text-box>
            <text:p/>
          </draw:text-box>
        </draw:frame>
        <draw:frame presentation:style-name="pr8" draw:text-style-name="P11" draw:layer="layout" svg:width="26.4cm" svg:height="16.7cm" svg:x="0.6cm" svg:y="6cm" presentation:class="outline" presentation:user-transformed="true">
          <draw:text-box>
            <text:list text:style-name="L2">
              <text:list-item>
                <text:p><text:span text:style-name="T13">Classify SNPs in each individual as in approach 1</text:span></text:p>
              </text:list-item>
              <text:list-item>
                <text:p><text:span text:style-name="T13">Identify regions frequently associated with diploid male phenotype</text:span></text:p>
              </text:list-item>
            </text:list>
          </draw:text-box>
        </draw:frame>
        <draw:frame draw:style-name="gr2" draw:text-style-name="P3" draw:layer="layout" svg:width="21.3cm" svg:height="11.65cm" svg:x="2.7cm" svg:y="8.5cm">
          <draw:image xlink:href="Pictures/100002010000094D000004EAABD4D9DCBA5AA082.png" xlink:type="simple" xlink:show="embed" xlink:actuate="onLoad">
            <text:p/>
          </draw:image>
        </draw:frame>
        <draw:custom-shape draw:style-name="gr12" draw:text-style-name="P16" draw:layer="layout" svg:width="0.282cm" svg:height="0.276cm" svg:x="22.045cm" svg:y="11.0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282cm" svg:height="0.276cm" svg:x="20.589cm" svg:y="13.3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282cm" svg:height="0.276cm" svg:x="23.497cm" svg:y="13.3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fter finding CSD<text:span text:style-name="T5"> </text:span><text:span text:style-name="T4">locus</text:span><text:span text:style-name="T5"> </text:span><text:span text:style-name="T4">?</text:span></text:p>
          </draw:text-box>
        </draw:frame>
        <draw:frame presentation:style-name="pr9" draw:text-style-name="P18" draw:layer="layout" svg:width="26.1cm" svg:height="9.106cm" svg:x="1.4cm" svg:y="5.715cm" presentation:class="outline" presentation:user-transformed="true">
          <draw:text-box>
            <text:list text:style-name="L2">
              <text:list-item>
                <text:p text:style-name="P18"><text:span text:style-name="T6">Reference genome currently being annotated</text:span></text:p>
              </text:list-item>
              <text:list-item>
                <text:p text:style-name="P18"><text:span text:style-name="T6">If annotated: look for candidate genes in </text:span><text:span text:style-name="T7">CSD locus</text:span></text:p>
              </text:list-item>
              <text:list-item>
                <text:p text:style-name="P18"><text:span text:style-name="T7">Else: gene prediction in CSD locus </text:span></text:p>
              </text:list-item>
              <text:list-item>
                <text:p text:style-name="P18"><text:span text:style-name="T7">Look for homologous sequences in related species with CS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CSD in the honeybee</text:span></text:p>
          </draw:text-box>
        </draw:frame>
        <draw:frame presentation:style-name="pr6" draw:layer="layout" svg:width="25.6cm" svg:height="12.18cm" svg:x="1.4cm" svg:y="4.714cm" presentation:class="outline" presentation:user-transformed="true">
          <draw:text-box>
            <text:list text:style-name="L2">
              <text:list-item>
                <text:p><text:span text:style-name="T7">In honeybee: recent duplication of ancestral </text:span><text:span text:style-name="T8">feminizer </text:span><text:span text:style-name="T7">(</text:span><text:span text:style-name="T8">fem</text:span><text:span text:style-name="T7">) into </text:span><text:span text:style-name="T8">csd</text:span><text:span text:style-name="T7"> and </text:span><text:span text:style-name="T8">fem</text:span></text:p>
              </text:list-item>
              <text:list-item>
                <text:p><text:span text:style-name="T7">Neofunctionalization of </text:span><text:span text:style-name="T8">csd</text:span></text:p>
              </text:list-item>
              <text:list-item>
                <text:p><text:span text:style-name="T14">Happened after split between stingless bees, bumble bee and honeybee</text:span></text:p>
              </text:list-item>
            </text:list>
          </draw:text-box>
        </draw:frame>
        <draw:frame draw:style-name="gr15" draw:text-style-name="P3" draw:layer="layout" svg:width="8.514cm" svg:height="9.453cm" svg:x="1.5cm" svg:y="11.39cm">
          <draw:image xlink:href="Pictures/10000201000002BC000001C9E85D0DA1045DFBB2.png" xlink:type="simple" xlink:show="embed" xlink:actuate="onLoad">
            <text:p/>
          </draw:image>
        </draw:frame>
        <draw:frame draw:style-name="gr16" draw:text-style-name="P20" draw:layer="layout" svg:width="5.257cm" svg:height="1.039cm" svg:x="10cm" svg:y="19.761cm">
          <draw:text-box>
            <text:p text:style-name="P19"><text:span text:style-name="T15">Gempe, T. &amp; Beye, M. (2009)  Nature Education 2(2):1</text:span></text:p>
          </draw:text-box>
        </draw:frame>
        <draw:frame draw:style-name="gr16" draw:text-style-name="P20" draw:layer="layout" svg:width="6.761cm" svg:height="1.039cm" svg:x="12cm" svg:y="17cm">
          <draw:text-box>
            <text:p text:style-name="P19"><text:span text:style-name="T15">Gempe, T. et al. (2009). PLoS Biology 7(10):e1000222</text:span></text:p>
          </draw:text-box>
        </draw:frame>
        <draw:frame draw:style-name="gr17" draw:text-style-name="P3" draw:layer="layout" svg:width="7.5cm" svg:height="10.769cm" svg:x="17.5cm" svg:y="10.231cm">
          <draw:image xlink:href="Pictures/100000000000024500000349FE83931D40640E1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fem/tra</text:span><text:span text:style-name="T4"> across Hymenoptera</text:span></text:p>
          </draw:text-box>
        </draw:frame>
        <draw:frame presentation:style-name="pr6" draw:text-style-name="P11" draw:layer="layout" svg:width="26.6cm" svg:height="12.18cm" svg:x="1.4cm" svg:y="4.614cm" presentation:class="outline" presentation:user-transformed="true">
          <draw:text-box>
            <text:list text:style-name="L2">
              <text:list-item>
                <text:p><text:span text:style-name="T14">Independent duplication(s) of </text:span><text:span text:style-name="T16">transformer </text:span><text:span text:style-name="T14">(</text:span><text:span text:style-name="T16">tra</text:span><text:span text:style-name="T14">) (</text:span><text:span text:style-name="T16">fem </text:span><text:span text:style-name="T14">ortholog) in ants</text:span></text:p>
              </text:list-item>
              <text:list-item>
                <text:p><text:span text:style-name="T13">What happened in L. Fabarum ?</text:span></text:p>
              </text:list-item>
            </text:list>
          </draw:text-box>
        </draw:frame>
        <draw:frame draw:style-name="gr18" draw:text-style-name="P3" draw:layer="layout" svg:width="20cm" svg:height="12.663cm" svg:x="7.5cm" svg:y="8.266cm">
          <draw:image xlink:href="Pictures/10000000000005680000035A7B6AE1A3191CBC81.png" xlink:type="simple" xlink:show="embed" xlink:actuate="onLoad">
            <text:p/>
          </draw:image>
        </draw:frame>
        <draw:frame draw:style-name="gr19" draw:text-style-name="P21" draw:layer="layout" svg:width="13.221cm" svg:height="1.096cm" svg:x="0.779cm" svg:y="19.904cm">
          <draw:text-box>
            <text:p><text:span text:style-name="T17"><text:s/></text:span><text:span text:style-name="T17">Privman E, Wurm Y, Keller L. 2013. <text:s/>Proc R Soc B 280: 20122968</text:span></text:p>
          </draw:text-box>
        </draw:frame>
        <draw:custom-shape draw:style-name="gr20" draw:text-style-name="P22" draw:layer="layout" svg:width="0.878cm" svg:height="0.597cm" svg:x="2.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7.741cm" svg:height="0.962cm" svg:x="3.6cm" svg:y="15.8cm">
          <draw:text-box>
            <text:p>Proof of CSD system</text:p>
          </draw:text-box>
        </draw:frame>
        <draw:custom-shape draw:style-name="gr22" draw:text-style-name="P23" draw:layer="layout" svg:width="1cm" svg:height="1cm" svg:x="2.4cm" svg:y="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3" draw:text-style-name="P4" draw:layer="layout" svg:width="9.303cm" svg:height="0.962cm" svg:x="3.601cm" svg:y="17.1cm">
          <draw:text-box>
            <text:p>Putative gene duplication event</text:p>
          </draw:text-box>
        </draw:frame>
        <draw:custom-shape draw:style-name="gr24" draw:text-style-name="P22" draw:layer="layout" svg:width="1.896cm" svg:height="0.46cm" svg:x="20.012cm" svg:y="11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1.896cm" svg:height="0.46cm" svg:x="21.127cm" svg:y="12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1.896cm" svg:height="0.46cm" svg:x="20.212cm" svg:y="11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1.896cm" svg:height="0.46cm" svg:x="17.712cm" svg:y="10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1.896cm" svg:height="0.46cm" svg:x="17.412cm" svg:y="9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1.896cm" svg:height="0.46cm" svg:x="19.193cm" svg:y="1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1.896cm" svg:height="0.46cm" svg:x="25.593cm" svg:y="18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1.896cm" svg:height="0.46cm" svg:x="17.572cm" svg:y="9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7.837cm" presentation:class="title" presentation:user-transformed="true">
          <draw:text-box>
            <text:p>Thank you !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sper's crossings</text:p>
          </draw:text-box>
        </draw:frame>
        <draw:frame draw:style-name="gr2" draw:text-style-name="P3" draw:layer="layout" svg:width="27.792cm" svg:height="14.464cm" svg:x="0.115cm" svg:y="5.536cm">
          <draw:image xlink:href="Pictures/10000201000010C8000008BC1C163A2E6066231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6.5cm" svg:height="14.152cm" svg:x="0.5cm" svg:y="4.848cm">
          <draw:image xlink:href="Pictures/100000000000052B000002899771B70C0B6A6FFF.png" xlink:type="simple" xlink:show="embed" xlink:actuate="onLoad">
            <text:p/>
          </draw:image>
        </draw:frame>
        <draw:custom-shape draw:style-name="gr25" draw:text-style-name="P22" draw:layer="layout" svg:width="2.078cm" svg:height="1.731cm" svg:x="19.14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2.632cm" svg:height="0.486cm" svg:x="19.144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2.078cm" svg:height="0.962cm" svg:x="16.144cm" svg:y="1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3cm" svg:height="0.962cm" svg:x="18.5cm" svg:y="19.738cm">
          <draw:text-box>
            <text:p>CSD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4.556cm" svg:height="17.829cm" svg:x="1.944cm" svg:y="1.4cm">
          <draw:image xlink:href="Pictures/100000000000049F0000035B26989BF9B3E0AC6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201cm" svg:height="20.499cm" svg:x="12.428cm" svg:y="0.501cm">
          <draw:image xlink:href="Pictures/1000000000000274000003464D6DBC03CEB568D3.png" xlink:type="simple" xlink:show="embed" xlink:actuate="onLoad">
            <text:p/>
          </draw:image>
        </draw:frame>
        <draw:frame presentation:style-name="pr6" draw:layer="layout" svg:width="25.199cm" svg:height="12.18cm" svg:x="0.9cm" svg:y="4.914cm" presentation:class="outline" presentation:user-transformed="true">
          <draw:text-box>
            <text:list text:style-name="L2">
              <text:list-item>
                <text:p><text:span text:style-name="T5">fem</text:span> gene copies in social<text:line-break/>insect speci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4H10M42S</meta:editing-duration>
    <meta:editing-cycles>146</meta:editing-cycles>
    <meta:generator>LibreOffice/5.1.6.2$Linux_X86_64 LibreOffice_project/10m0$Build-2</meta:generator>
    <dc:date>2017-03-21T08:27:21.311706109</dc:date>
    <meta:document-statistic meta:object-count="141"/>
  </office:meta>
</office:document-meta>
</file>